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urvived,Pclass,Name,Sex,Age,Siblings/Spouses Aboard,Parents/Children Aboard,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wen Harris Braund,male,22,1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ohn Bradley (Florence Briggs Thayer) Cumings,female,38,1,0,71.2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Laina Heikkinen,female,26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acques Heath (Lily May Peel) Futrelle,female,35,1,0,5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Henry Allen,male,3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Moran,male,27,0,0,8.4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Timothy J McCarthy,male,54,0,0,51.8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Gosta Leonard Palsson,male,2,3,1,21.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Oscar W (Elisabeth Vilhelmina Berg) Johnson,female,27,0,2,11.1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Nicholas (Adele Achem) Nasser,female,14,1,0,30.0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guerite Rut Sandstrom,female,4,1,1,1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zabeth Bonnell,female,58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Henry Saundercock,male,2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ders Johan Andersson,male,39,1,5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Hulda Amanda Adolfina Vestrom,female,14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Mary D Kingcome) Hewlett,female,55,0,0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Eugene Rice,male,2,4,1,29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Charles Eugene Williams,male,23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ulius (Emelia Maria Vandemoortele) Vander Planke,female,31,1,0,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Fatima Masselmani,female,22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seph J Fynney,male,35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Lawrence Beesley,male,3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McGowan,female,15,0,0,8.0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William Thompson Sloper,male,28,0,0,3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Torborg Danira Palsson,female,8,3,1,21.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Carl Oscar (Selma Augusta Emilia Johansson) Asplund,female,38,1,5,31.3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arred Chehab Emir,male,26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Charles Alexander Fortune,male,19,3,2,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llen O'Dwyer,female,24,0,0,7.8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alio Todoroff,male,2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Don. Manuel E Uruchurtu,male,40,0,0,27.7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William Augustus (Marie Eugenie) Spencer,female,48,1,0,146.5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y Agatha Glynn,female,18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dward H Wheadon,male,66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dgar Joseph Meyer,male,28,1,0,82.1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lexander Oskar Holverson,male,42,1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Hanna Mamee,male,18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est Charles Cann,male,21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Augusta Maria Vander Planke,female,18,2,0,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Jamila Nicola-Yarred,female,14,1,0,11.2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ohan (Johanna Persdotter Larsson) Ahlin,female,40,1,0,9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s. William John Robert (Dorothy Ann Wonnacott) Turpin,female,27,1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Simonne Marie Anne Andree Laroche,female,3,1,2,41.5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garet Delia Devaney,female,19,0,0,7.8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John Rogers,male,3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enis Lennon,male,20,1,0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Bridget O'Driscoll,female,27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Youssef Samaan,male,16,2,0,21.6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osef (Josefine Franchi) Arnold-Franchi,female,18,1,0,1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Juha Niilo Panula,male,7,4,1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ichard Cater Nosworthy,male,21,0,0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Henry Sleeper (Myna Haxtun) Harper,female,49,1,0,76.7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Lizzie (Elizabeth Anne Wilkinson) Faunthorpe,female,29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ngelhart Cornelius Ostby,male,65,0,1,61.9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ugh Woolner,male,46,0,0,3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mily Rugg,female,21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nsouer Novel,male,28.5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Constance Mirium West,female,5,1,2,2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William Frederick Goodwin,male,11,5,2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rsen Sirayanian,male,22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melie Icard,female,38,0,0,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enry Birkhardt Harris,male,45,1,0,83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Harald Skoog,male,4,3,2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lbert A Stewart,male,64,0,0,27.7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Gerios Moubarek,male,7,1,1,15.2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Elizabeth Ramell) Nye,female,29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est James Crease,male,19,0,0,8.1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rna Alexandra Andersson,female,17,4,2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Vincenz Kink,male,26,2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tephen Curnow Jenkin,male,32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Lillian Amy Goodwin,female,16,5,2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mbrose Jr Hood,male,21,0,0,7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postolos Chronopoulos,male,26,1,0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Lee Bing,male,32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igurd Hansen Moen,male,25,0,0,7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van Staneff,male,2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ahamin Haim Moutal,male,28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Alden Gates Caldwell,male,0.83,0,2,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lizabeth Dowdell,female,30,0,0,12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chille Waelens,male,22,0,0,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Jan Baptist Sheerlinck,male,29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Brigdet Delia McDermott,female,31,0,0,7.7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Francisco M Carrau,male,28,0,0,4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Bertha Ilett,female,17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Karl Alfred (Maria Mathilda Gustafsson) Backstrom,female,33,3,0,15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Neal Ford,male,16,1,3,34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elman Francis Slocovski,male,2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bel Helen Fortune,female,23,3,2,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ancesco Celotti,male,2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mil Christmann,male,29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ul Edvin Andreasson,male,20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erbert Fuller Chaffee,male,46,1,0,61.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Bertram Frank Dean,male,26,1,2,20.5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niel Coxon,male,59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harles Joseph Shorney,male,2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George B Goldschmidt,male,71,0,0,34.6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William Bertram Greenfield,male,23,0,1,63.3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John T (Ada Julia Bone) Doling,female,34,0,1,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inai Kantor,male,34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tilda Petranec,female,28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stcho Petroff,male,29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Richard Frasar White,male,21,0,1,77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ustaf Joel Johansson,male,33,0,0,8.6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ders Vilhelm Gustafsson,male,37,2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toytcho Mionoff,male,28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Kristine Salkjelsvik,female,21,0,0,7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Albert Johan Moss,male,29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ido Rekic,male,38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Bertha Moran,female,28,1,0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alter Chamberlain Porter,male,47,0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Hileni Zabour,female,14.5,1,0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vid John Barton,male,2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Katriina Jussila,female,20,1,0,9.8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lake Attalah,female,17,0,0,14.4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dvard Pekoniemi,male,21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trick Connors,male,70.5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John Robert Turpin,male,29,1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Quigg Edmond Baxter,male,24,0,1,247.5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Ellis Anna Maria Andersson,female,2,4,2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tanley George Hickman,male,21,2,0,7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onard Charles Moore,male,19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Nicholas Nasser,male,32.5,1,0,30.0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Susan Webber,female,32.5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Percival Wayland White,male,54,0,1,77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Elias Nicola-Yarred,male,12,1,0,11.2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rtin McMahon,male,19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Fridtjof Arne Madsen,male,24,0,0,7.1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Peter,female,2,1,1,22.3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Ekstrom,male,45,0,0,6.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zef Drazenoic,male,3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omingos Fernandeo Coelho,male,20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Alexander A (Grace Charity Laury) Robins,female,47,1,0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Leopold (Mathilde Francoise Pede) Weisz,female,29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amuel James Hayden Sobey,male,25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mile Richard,male,23,0,0,15.0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Helen Monypeny Newsom,female,19,0,2,26.2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acques Heath Futrelle,male,37,1,0,5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laf Elon Osen,male,16,0,0,9.2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Victor Giglio,male,24,0,0,79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oseph (Sultana) Boulos,female,40,0,2,15.2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Sofia Nysten,female,22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Pekka Pietari (Elin Matilda Dolck) Hakkarainen,female,24,1,0,15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eremiah Burke,male,19,0,0,6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dgardo Samuel Andrew,male,18,0,0,1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seph Charles Nicholls,male,19,1,1,36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August Edvard Andersson,male,27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Robina Maggie Ford,female,9,2,2,34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Michel Navratil,male,36.5,0,2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Thomas Roussel Davids Byles,male,42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Robert James Bateman,male,51,0,0,12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Thomas (Edith Wearne) Pears,female,22,1,0,6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onzo Meo,male,55.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ustin Blyler van Billiard,male,40.5,0,2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le Martin Olsen,male,27,0,0,7.3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Charles Duane Williams,male,51,0,1,61.3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Katherine Gilnagh,female,16,0,0,7.7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arry Corn,male,3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le Smiljanic,male,37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Thomas Henry Sage,male,5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Hatfield Cribb,male,44,0,1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James (Elizabeth Inglis Milne) Watt,female,40,0,0,15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Viktor Bengtsson,male,26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vo Calic,male,17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Eino Viljami Panula,male,1,4,1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Frank John William Goldsmith,male,9,0,2,20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(Edith Martha Bowerman) Chibnall,female,48,0,1,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William (Anna Bernhardina Karlsson) Skoog,female,45,1,4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ohn D Baumann,male,60,0,0,25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e Ling,male,28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yckoff Van der hoef,male,61,0,0,3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Arthur Rice,male,4,4,1,29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leanor Ileen Johnson,female,1,1,1,11.1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tti Wilhelm Sivola,male,21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ames Clinch Smith,male,56,0,0,30.6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las Albin Klasen,male,18,1,1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Henry Forbes Lefebre,male,5,3,1,25.4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iss. Ann Elizabeth Isham,female,50,0,0,28.7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eginald Hale,male,3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ionel Leonard,male,36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Constance Gladys Sage,female,8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ene Pernot,male,39,0,0,15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Clarence Gustaf Hugo Asplund,male,9,4,2,31.3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Richard F Becker,male,1,2,1,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Luise Gretchen Kink-Heilmann,female,4,0,2,22.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ugh Roscoe Rood,male,39,0,0,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Thomas (Johanna Godfrey) O'Brien,female,26,1,0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Charles Hallace Romaine,male,45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Bourke,male,40,1,1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tjepan Turcin,male,36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Rosa) Pinsky,female,32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Carbines,male,19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Carla Christine Nielsine Andersen-Jensen,female,19,1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Michel M Navratil,male,3,1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ames Joseph (Margaret Tobin) Brown,female,44,0,0,27.7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se Lurette,female,58,0,0,146.5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obert Mernagh,male,28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rl Siegwart Andreas Olsen,male,42,0,1,8.4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garet Madigan,female,21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iss. Henriette Yrois,female,2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estor Cyriel Vande Walle,male,28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ederick Sage,male,17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kob Alfred Johanson,male,34,0,0,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erious Youseff,male,45.5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Gurshon Cohen,male,18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Telma Matilda Strom,female,2,0,1,10.4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rl Alfred Backstrom,male,32,1,0,15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Nassef Cassem Albimona,male,26,0,0,18.7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elen Carr,female,16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enry Blank,male,40,0,0,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hmed Ali,male,24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Clear Annie Cameron,female,35,0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Henry Perkin,male,22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Hans Kristensen Givard,male,3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hilip Kiernan,male,22,1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deleine Newell,female,31,1,0,113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liina Honkanen,female,27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idney Samuel Jacobsohn,male,42,1,0,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lbina Bazzani,female,32,0,0,76.29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alter Harris,male,30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Victor Francis Sunderland,male,16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ames H Bracken,male,27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eorge Henry Green,male,51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hristo Nenkoff,male,2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Frederick Maxfield Hoyt,male,38,1,0,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rl Ivar Sven Berglund,male,22,0,0,9.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William John Mellors,male,19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Hall Lovell,male,20.5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rne Jonas Fahlstrom,male,1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thilde Lefebre,female,12,3,1,25.4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Henry Birkhardt (Irene Wallach) Harris,female,35,1,0,83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Bengt Edvin Larsson,male,29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rnst Adolf Sjostedt,male,59,0,0,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Lillian Gertrud Asplund,female,5,4,2,31.3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obert William Norman Leyson,male,24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Alice Phoebe Harknett,female,21,0,0,7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tephen Hold,male,44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Marjorie Collyer,female,8,0,2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Frederick William Pengelly,male,19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George Henry Hunt,male,33,0,0,12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Thamine Zabour,female,19,1,0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Katherine Murphy,female,18,1,0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eginald Charles Coleridge,male,29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tti Alexanteri Maenpaa,male,22,0,0,7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leiman Attalah,male,30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Dr. William Edward Minahan,male,44,2,0,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Agda Thorilda Viktoria Lindahl,female,25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William (Anna) Hamalainen,female,24,0,2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Richard Leonard Beckwith,male,37,1,1,52.5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Ernest Courtenay Carter,male,54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George Reed,male,18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Wilhelm (Elna Matilda Persson) Strom,female,29,1,1,10.4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Thomas Stead,male,62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Arthur Lobb,male,30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Viktor (Helena Wilhelmina) Rosblom,female,41,0,2,20.2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Darwis (Hanne Youssef Razi) Touma,female,29,0,2,15.2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Gertrude Maybelle Thorne,female,38,0,0,79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Gladys Cherry,female,30,0,0,8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nna Ward,female,35,0,0,512.3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Lutie Davis) Parrish,female,50,0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Edvin Rojj Felix Asplund,male,3,4,2,31.3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mil Taussig,male,52,1,1,79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Harrison,male,40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Delia Henry,female,21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David Reeves,male,36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esti Arvid Panula,male,16,4,1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Ernst Ulrik Persson,male,25,1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William Thompson (Edith Junkins) Graham,female,58,0,1,153.4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melia Bissette,female,35,0,0,135.6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lexander Cairns,male,28,0,0,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William Henry Tornquist,male,25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Elizabeth Anne Maidment) Mellinger,female,41,0,1,1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Charles H Natsch,male,37,0,1,29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anora Healy,female,33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Kornelia Theodosia Andrews,female,63,1,0,77.9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Augusta Charlotta Lindblom,female,45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Francis Parkes,male,21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Eric Rice,male,7,4,1,29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Stanton (Rosa Hunt) Abbott,female,35,1,1,20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ank Duane,male,65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ils Johan Goransson Olsson,male,28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ons de Pelsmaeker,male,16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Edward Arthur Dorking,male,19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Richard William Smith,male,57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van Stankovic,male,33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Theodore de Mulder,male,30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nko Naidenoff,male,2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Masabumi Hosono,male,42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Kate Connolly,female,22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len Barber,female,26,0,0,78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Dickinson H (Helen Walton) Bishop,female,19,1,0,91.0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ene Jacques Levy,male,36,0,0,12.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Aloisia Haas,female,24,0,0,8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van Mineff,male,24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rvin G Lewy,male,30,0,0,27.7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nsour Hanna,male,23.5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iss. Helen Loraine Allison,female,2,1,2,151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Adolphe Saalfeld,male,47,0,0,3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ames (Helene DeLaudeniere Chaput) Baxter,female,50,0,1,247.5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Katherine Kelly,female,20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Bernard McCoy,male,24,2,0,23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Cahoone Jr Johnson,male,19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Nora A Keane,female,46,0,0,12.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oward Hugh Williams,male,28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aster. Hudson Trevor Allison,male,0.92,1,2,151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garet Fleming,female,42,0,0,110.8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Victor de Satode (Maria Josefa Perez de Soto y Vallejo) Penasco y Castellana,female,17,1,0,108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amuel Abelson,male,30,1,0,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Laura Mabel Francatelli,female,30,0,0,56.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garet Bechstein Hays,female,24,0,0,83.1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mily Borie Ryerson,female,18,2,2,262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s. William (Anna Sylfven) Lahtinen,female,26,1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gnjac Hendekovic,male,28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Benjamin Hart,male,43,1,1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elmina Josefina Nilsson,female,26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Sinai (Miriam Sternin) Kantor,female,24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Dr. Ernest Moraweck,male,54,0,0,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y Natalie Wick,female,31,0,2,164.8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Frederic Oakley (Margaretta Corning Stone) Spedden,female,40,1,1,13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amuel Dennis,male,22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Yoto Danoff,male,27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Hilda Mary Slayter,female,30,0,0,12.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Albert Francis (Sylvia Mae Harbaugh) Caldwell,female,22,1,1,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eorge John Jr Sage,male,20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ie Grice Young,female,36,0,0,135.6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Hansen Nysveen,male,61,0,0,6.2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Ada E Hall) Ball,female,36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Frank John (Emily Alice Brown) Goldsmith,female,31,1,1,20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Jean Gertrude Hippach,female,16,0,1,57.9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gnes McCoy,female,28,2,0,23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usten Partner,male,45.5,0,0,28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George Edward Graham,male,38,0,1,153.4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o Edmondus Vander Planke,male,16,2,0,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Henry William (Clara Heinsheimer) Frauenthal,female,42,1,0,133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tto Denkoff,male,30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Thomas Clinton Pears,male,29,1,0,6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zabeth Margaret Burns,female,41,0,0,13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Karl Edwart Dahl,male,4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Stephen Weart Blackwell,male,45,0,0,3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Edmond Roger Navratil,male,2,1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lice Elizabeth Fortune,female,24,3,2,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rik Gustaf Collander,male,2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Charles Frederick Waddington Sedgwick,male,25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tanley Hubert Fox,male,36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Amelia Brown,female,2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Marion Elsie Smith,female,4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Thomas Henry (Mary E Finck) Davison,female,34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William Loch Coutts,male,3,1,1,1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van Dimic,male,42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ils Martin Odahl,male,23,0,0,9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Fletcher Fellows Williams-Lambert,male,43,0,0,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annous Elias,male,15,1,1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sef Arnold-Franchi,male,25,1,0,1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azli Yousif,male,23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o Peter Vanden Steen,male,28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sie Edith Bowerman,female,22,0,1,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iss. Annie Clemmer Funk,female,3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y McGovern,female,22,0,0,7.8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elen Mary Mockler,female,23,0,0,7.8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helm Skoog,male,40,1,4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ebastiano del Carlo,male,29,1,0,27.7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(Catherine David) Barbara,female,45,0,1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dola Asim,male,35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homas O'Brien,male,27,1,0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uritz Nils Martin Adahl,male,30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Frank Manley (Anna Sophia Atkinson) Warren,female,60,1,0,75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(Mantoura Boulos) Moussa,female,35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ie Jermyn,female,22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me. Leontine Pauline Aubart,female,24,0,0,69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George Achilles Harder,male,25,1,0,55.4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kob Alfred Wiklund,male,18,1,0,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Thomas Beavan,male,19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Sante Ringhini,male,22,0,0,135.6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Stina Viola Palsson,female,3,3,1,21.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Edgar Joseph (Leila Saks) Meyer,female,25,1,0,82.1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urora Adelia Landergren,female,22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arry Elkins Widener,male,27,0,2,21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annous Betros,male,20,0,0,4.0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rl Gideon Gustafsson,male,19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Rosalie Bidois,female,42,0,0,227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ia Nakid,female,1,0,2,15.7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uho Tikkanen,male,32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Alexander Oskar (Mary Aline Towner) Holverson,female,35,1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Vasil Plotcharsky,male,27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Charles Henry Davies,male,18,0,0,7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Sidney Leonard Goodwin,male,1,5,2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Kate Buss,female,36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tthew Sadlier,male,19,0,0,7.7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Bertha Lehmann,female,17,0,0,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William Ernest Carter,male,36,1,2,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Carl Olof Jansson,male,21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Birger Gustafsson,male,28,2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jorie Newell,female,23,1,0,113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Hjalmar (Agnes Charlotta Bengtsson) Sandstrom,female,24,0,2,1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ik Johansson,male,22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Elina Olsson,female,31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Peter David McKane,male,46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Dr. Alfred Pain,male,23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William H (Jessie L) Trout,female,28,0,0,12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Juha Niskanen,male,39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Adams,male,26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i Aina Jussila,female,21,1,0,9.8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kka Pietari Hakkarainen,male,28,1,0,15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ija Oreskovic,female,20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hadrach Gale,male,34,1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arl/Charles Peter Widegren,male,51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William Rowe Richards,male,3,1,1,18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ans Martin Monsen Birkeland,male,21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Ida Lefebre,female,3,3,1,25.4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odor Sdycoff,male,4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enry Hart,male,27,0,0,6.8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Daisy E Minahan,female,33,1,0,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lfred Fleming Cunningham,male,22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Johan Julian Sundman,male,44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Thomas (Annie Louise Rowley) Meek,female,3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James Vivian (Lulu Thorne Christian) Drew,female,34,1,1,32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Lyyli Karoliina Silven,female,18,0,2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John Matthews,male,3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Catharina Van Impe,female,10,0,2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vid Charters,male,21,0,0,7.7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o Zimmerman,male,29,0,0,7.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Ernst Gilbert (Anna Sigrid Maria Brogren) Danbom,female,28,1,1,1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Viktor Richard Rosblom,male,18,1,1,20.2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hillippe Wiseman,male,54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Charles V (Ada Maria Winfield) Clarke,female,28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Kate Florence Phillips,female,19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Flynn,male,28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Berk (Berk Trembisky) Pickard,male,3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Mauritz Hakan Bjornstrom-Steffansson,male,28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Percival (Florence Kate White) Thorneycroft,female,33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Charles Alexander (Alice Adelaide Slow) Louch,female,42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ikolai Erland Kallio,male,17,0,0,7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Baird Silvey,male,50,1,0,5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Lucile Polk Carter,female,14,1,2,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Doolina Margaret Ford,female,21,2,2,34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Sidney (Emily Hocking) Richards,female,24,2,3,18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Mark Fortune,male,64,1,4,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han Henrik Johannesson Kvillner,male,31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Benjamin (Esther Ada Bloomfield) Hart,female,45,1,1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on Hampe,male,20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Emil Petterson,male,25,1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s. Encarnacion Reynaldo,female,2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Bernt Johannesen-Bratthammer,male,29,0,0,8.1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aster. Washington Dodge,male,4,0,2,81.8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Madeleine Violet Mellinger,female,13,0,1,1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Frederic Kimber Seward,male,34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ie Catherine Baclini,female,5,2,1,19.2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ajor. Arthur Godfrey Peuchen,male,52,0,0,3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dwy Arthur West,male,36,1,2,2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ngvald Olai Olsen Hagland,male,28,1,0,19.9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Benjamin Laventall Foreman,male,30,0,0,2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Samuel L Goldenberg,male,49,1,0,89.1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seph Peduzzi,male,2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Ivan Jalsevac,male,29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Francis Davis Millet,male,65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Frederick R (Marion) Kenyon,female,41,1,0,51.8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llen Toomey,female,50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urice O'Connor,male,17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arry Anderson,male,48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Morley,male,3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rthur H Gee,male,47,0,0,38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acob Christian Milling,male,4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imon Maisner,male,3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nuel Estanslas Goncalves,male,38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Campbell,male,21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ohn Montgomery Smart,male,56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Scanlan,male,22,0,0,7.7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elene Barbara Baclini,female,0.75,2,1,19.2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rthur Keefe,male,39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uka Cacic,male,38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Edwy Arthur (Ada Mary Worth) West,female,33,1,2,2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Amin S (Marie Marthe Thuillard) Jerwan,female,23,0,0,13.79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Ida Sofia Strandberg,female,22,0,0,9.8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George Quincy Clifford,male,40,0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Peter Henry Renouf,male,34,1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wis Richard Braund,male,29,1,0,7.0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ils August Karlsson,male,22,0,0,7.5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ildur E Hirvonen,female,2,0,1,12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Harold Victor Goodwin,male,9,5,2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nthony Wood Frost,male,37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ichard Henry Rouse,male,5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(Hedwig) Turkula,female,63,0,0,9.5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Dickinson H Bishop,male,25,1,0,91.0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Jeannie Lefebre,female,8,3,1,25.4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Frederick Maxfield (Jane Anne Forby) Hoyt,female,35,1,0,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dward Austin Kent,male,58,0,0,29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ancis William Somerton,male,3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Eden Leslie Coutts,male,9,1,1,1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onrad Mathias Reiersen Hagland,male,19,1,0,19.9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inar Windelov,male,21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arry Markland Molson,male,55,0,0,3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Ramon Artagaveytia,male,71,0,0,49.5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dward Roland Stanley,male,21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erious Yousseff,male,26,0,0,14.4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zabeth Mussey Eustis,female,54,1,0,78.2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ederick William Shellard,male,55,0,0,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s. Hudson J C (Bessie Waldo Daniels) Allison,female,25,1,2,151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lof Svensson,male,24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tar Calic,male,17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y Canavan,female,21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Bridget Mary O'Sullivan,female,21,0,0,7.6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Kristina Sofia Laitinen,female,37,0,0,9.5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Roberta Maioni,female,16,0,0,8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Victor de Satode Penasco y Castellana,male,18,1,0,108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Frederick Charles (Jane Richards) Quick,female,33,0,2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George Bradley,male,37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enry Margido Olsen,male,28,0,0,22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Fang Lang,male,26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Eugene Patrick Daly,male,29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Webber,male,66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James Robert McGough,male,36,0,0,26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Martin (Elizabeth L. Barrett) Rothschild,female,54,1,0,59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atio Coleff,male,24,0,0,7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Anderson Walker,male,47,0,0,34.0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Amelia Milley) Lemore,female,34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trick Ryan,male,30,0,0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William A (Florence Agnes Hughes) Angle,female,36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tefo Pavlovic,male,3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nne Perreault,female,30,0,0,9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nko Vovk,male,2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arkis Lahoud,male,35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Louis Albert (Ida Sophia Fischer) Hippach,female,44,0,1,57.9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ared Kassem,male,18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Farrell,male,40.5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Lucy Ridsdale,female,50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ohn Farthing,male,49,0,0,221.7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Werner Salonen,male,39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ichard George Hocking,male,23,2,1,1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Phyllis May Quick,female,2,1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akli Toufik,male,17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seph Jr Elias,male,17,1,1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Catherine (Catherine Rizk) Peter,female,24,0,2,22.3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ija Cacic,female,30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va Miriam Hart,female,7,0,2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ajor. Archibald Willingham Butt,male,45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Bertha LeRoy,female,30,0,0,106.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amuel Beard Risien,male,69,0,0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Hedwig Margaritha Frolicher,female,22,0,2,4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Harriet R Crosby,female,36,0,2,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Ingeborg Constanzia Andersson,female,9,4,2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Sigrid Elisabeth Andersson,female,11,4,2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Edward Beane,male,32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alter Donald Douglas,male,50,1,0,106.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rthur Ernest Nicholson,male,64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Edward (Ethel Clarke) Beane,female,19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Julian Padro y Manent,male,27,0,0,13.8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ank John Goldsmith,male,33,1,1,20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John Morgan Jr Davies,male,8,1,1,36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John Borland Jr Thayer,male,17,0,2,110.8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Percival James R Sharp,male,27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imothy O'Brien,male,21,0,0,7.8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Fahim Leeni,male,22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Velin Ohman,female,22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George Wright,male,62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Lady. (Lucille Christiana Sutherland)Duff Gordon,female,48,1,0,39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Victor Robbins,male,45,0,0,227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Emil (Tillie Mandelbaum) Taussig,female,39,1,1,79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Guillaume Joseph (Emma) de Messemaeker,female,36,1,0,1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homas Rowan Morrow,male,30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usein Sivic,male,40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obert Douglas Norman,male,28,0,0,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Simmons,male,4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(Marion Ogden) Meanwell,female,6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red J Davies,male,24,2,0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lia Stoytcheff,male,19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Nils (Alma Cornelia Berglund) Palsson,female,29,0,4,21.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annous Doharr,male,28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Carl Jonsson,male,32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George Harris,male,62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Edward Dale (Charlotte Lamson) Appleton,female,53,2,0,51.4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John Irwin Flynn,male,36,0,0,26.3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y Kelly,female,22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red George John Rush,male,16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eorge Patchett,male,19,0,0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thel Garside,female,3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William Baird (Alice Munger) Silvey,female,39,1,0,5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oseph (Maria Elias) Caram,female,18,1,0,14.4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Eiriik Jussila,male,32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Julie Rachel Christy,female,25,1,1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ohn Borland (Marian Longstreth Morris) Thayer,female,39,1,1,110.8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James Downton,male,54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ohn Hugo Ross,male,36,0,0,40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Uscher Paulner,male,16,0,0,8.7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Ruth Taussig,female,18,0,2,79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hn Denzil Jarvis,male,47,0,0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Maxmillian Frolicher-Stehli,male,60,1,1,79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liezer Gilinski,male,2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seph Murdlin,male,22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tti Rintamaki,male,35,0,0,7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Walter Bertram (Martha Eustis) Stephenson,female,52,1,0,78.2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James Elsbury,male,47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y Bourke,female,40,0,2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hn Henry Chapman,male,37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ean Baptiste Van Impe,male,36,1,1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Jessie Wills Leitch,female,31,0,0,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red Johnson,male,49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anna Boulos,male,18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Sir. Cosmo Edmund Duff Gordon,male,49,1,0,56.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Sidney Samuel (Amy Frances Christy) Jacobsohn,female,24,2,1,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tco Slabenoff,male,4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Charles H Harrington,male,37,0,0,42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st William Torber,male,4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arry Homer,male,35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dvard Bengtsson Lindell,male,36,1,0,15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lan Karaic,male,30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Robert Williams Daniel,male,27,0,0,3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Joseph (Juliette Marie Louise Lafargue) Laroche,female,22,1,2,41.5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zabeth W Shutes,female,40,0,0,153.4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Anders Johan (Alfrida Konstantia Brogren) Andersson,female,39,1,5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se Neto Jardin,male,21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garet Jane Murphy,female,18,1,0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Horgan,male,22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Alfred Brocklebank,male,3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Alice Herman,female,24,1,2,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st Gilbert Danbom,male,34,1,1,1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William Arthur (Cordelia K Stanlick) Lobb,female,26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Marion Louise Becker,female,4,2,1,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Lawrence Gavey,male,26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toni Yasbeck,male,27,1,0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Edwin Nelson Jr Kimball,male,42,1,0,52.5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Sahid Nakid,male,20,1,1,15.7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enry Damsgaard Hansen,male,21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vid John Bowen,male,21,0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Frederick Sutton,male,61,0,0,32.3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Charles Leonard Kirkland,male,57,0,0,12.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Gretchen Fiske Longley,female,21,0,0,77.9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uentcho Bostandyeff,male,26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trick D O'Connell,male,18,0,0,7.7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Algernon Henry Wilson Barkworth,male,80,0,0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Svensson Lundahl,male,51,0,0,7.0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Dr. Max Stahelin-Maeglin,male,32,0,0,3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Henry Marsh Parr,male,30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bel Skoog,female,9,3,2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Mary Davis,female,28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tti Gustaf Leinonen,male,32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Harvey Collyer,male,31,1,1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uha (Maria Emilia Ojala) Panula,female,41,0,5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rcival Thorneycroft,male,37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ans Peder Jensen,male,20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lle. Emma Sagesser,female,24,0,0,69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git Elizabeth Skoog,female,2,3,2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Choong Foo,male,32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Eugenie Baclini,female,0.75,2,1,19.2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enry Sleeper Harper,male,48,1,0,76.7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iudevit Cor,male,19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Col. Oberst Alfons Simonius-Blumer,male,56,0,0,3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dward Willey,male,21,0,0,7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my Zillah Elsie Stanley,female,23,0,0,7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to Mitkoff,male,2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lsie Doling,female,18,0,1,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nes Halvorsen Kalvik,male,21,0,0,8.4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Hanora O'Leary,female,16,0,0,7.8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Hanora Hegarty,female,18,0,0,6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Leonard Mark Hickman,male,24,2,0,7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exander Radeff,male,27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ohn (Catherine) Bourke,female,32,1,1,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George Floyd Eitemiller,male,23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Arthur Webster Newell,male,58,0,2,113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Dr. Henry William Frauenthal,male,50,2,0,133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ohamed Badt,male,40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Edward Pomeroy Colley,male,47,0,0,25.5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ju Coleff,male,36,0,0,7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Eino William Lindqvist,male,20,1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Lewis Hickman,male,32,2,0,7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eginald Fenton Butler,male,25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nud Paust Rommetvedt,male,49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cob Cook,male,43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Elmer Zebley (Juliet Cummins Wright) Taylor,female,48,1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Thomas William Solomon (Elizabeth Catherine Ford) Brown,female,40,1,1,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Thornton Davidson,male,31,1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Henry Michael Mitchell,male,70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. Charles Wilhelms,male,31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Ennis Hastings Watson,male,19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Gustaf Hjalmar Edvardsson,male,18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Frederick Charles Sawyer,male,24.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Sofia Turja,female,18,0,0,9.8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Frederick (Augusta Tyler) Goodwin,female,43,1,6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Thomas Drake Martinez Cardeza,male,36,0,1,512.3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Katie Peters,female,28,0,0,8.1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Hammad Hassab,male,27,0,0,76.7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hor Anderson Olsvigen,male,20,0,0,9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harles Edward Goodwin,male,14,5,2,4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Thomas William Solomon Brown,male,60,1,1,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seph Philippe Lemercier Laroche,male,25,1,2,41.5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ako Arnold Panula,male,14,4,1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Branko Dakic,male,19,0,0,10.1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berhard Thelander Fischer,male,18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Georgette Alexandra Madill,female,15,0,1,211.3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Albert Adrian Dick,male,31,1,0,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nca Karun,female,4,0,1,13.4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Ali Lam,male,37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halil Saad,male,25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Col. John Weir,male,60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Charles Henry Chapman,male,52,0,0,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Kelly,male,4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Katherine Mullens,female,19,0,0,7.7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John Borland Thayer,male,49,1,1,110.8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dolf Mathias Nicolai Olsen Humblen,male,42,0,0,7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ohn Jacob (Madeleine Talmadge Force) Astor,female,18,1,0,227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Spencer Victor Silverthorne,male,35,0,0,26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Saiide Barbara,female,18,0,1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rtin Gallagher,male,25,0,0,7.7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enrik Juul Hansen,male,26,1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Henry Samuel Morley,male,39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Florence Kelly,female,45,0,0,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Edward Pennington Calderhead,male,42,0,0,26.2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lice Cleaver,female,22,0,0,151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Halim Gonios Moubarek,male,4,1,1,15.2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lle. Berthe Antonine Mayne,female,24,0,0,49.5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Herman Klaber,male,41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Elmer Zebley Taylor,male,48,1,0,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ugust Viktor Larsson,male,29,0,0,9.4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Samuel Greenberg,male,52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ter Andreas Lauritz Andersen Soholt,male,19,0,0,7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Caroline Louise Endres,female,38,0,0,227.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Edwina Celia Troutt,female,27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lkolm Joackim Johnson,male,33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Annie Jessie Harper,female,6,0,1,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Svend Lauritz Jensen,male,17,1,0,7.0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Henry Gillespie,male,3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Henry Price Hodges,male,5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Norman Campbell Chambers,male,27,1,0,5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uka Oreskovic,male,20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Peter Henry (Lillian Jefferys) Renouf,female,30,3,0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Margareth Mannion,female,28,0,0,7.7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Kurt Arnold Gottfrid Bryhl,male,25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Pieta Sofia Ilmakangas,female,25,1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Elisabeth Walton Allen,female,29,0,0,211.3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oussein G N Hassan,male,11,0,0,18.7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obert J Knight,male,41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William John Berriman,male,23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Moses Aaron Troupiansky,male,23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slie Williams,male,28.5,0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Edward (Margaret Ann Watson) Ford,female,48,1,3,34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Gustave J Lesurer,male,35,0,0,512.3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nio Ivanoff,male,20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nko Nankoff,male,32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Walter James Hawksford,male,45,0,0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Tyrell William Cavendish,male,36,1,0,78.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Susan Parker Ryerson,female,21,2,2,262.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eal McNamee,male,24,1,0,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Juho Stranden,male,31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Capt. Edward Gifford Crosby,male,70,1,1,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ossmore Edward Abbott,male,16,1,1,20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Anna Sinkkonen,female,30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Daniel Warner Marvin,male,19,1,0,5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ichael Connaghton,male,31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Joan Wells,female,4,1,1,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Meier Moor,male,6,0,1,12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nes Joseph Vande Velde,male,33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alio Jonkoff,male,2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Samuel (Jane Laver) Herman,female,48,1,2,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Viljo Hamalainen,male,0.67,1,1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ugust Sigfrid Carlsson,male,28,0,0,7.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Percy Andrew Bailey,male,18,0,0,1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homas Leonard Theobald,male,34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the Countess. of (Lucy Noel Martha Dyer-Edwards) Rothes,female,33,0,0,8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Garfirth,male,23,0,0,1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isakki Antino Aijo Nirva,male,41,0,0,7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Hanna Assi Barah,male,20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William Ernest (Lucile Polk) Carter,female,36,1,2,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ans Linus Eklund,male,16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John C (Anna Andrews) Hogeboom,female,51,1,0,77.9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Dr. Arthur Jackson Brewe,male,46,0,0,39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Mary Mangan,female,30.5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niel J Moran,male,28,1,0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aniel Danielsen Gronnestad,male,32,0,0,8.3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ene Aime Lievens,male,24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iels Peder Jensen,male,48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s. (Mary) Mack,female,57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ibo Elias,male,29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Elizabeth (Eliza Needs) Hocking,female,54,1,3,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hr Fabian Oliver Malkolm Myhrman,male,18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oger Tobin,male,20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Virginia Ethel Emanuel,female,5,0,0,12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Thomas J Kilgannon,male,22,0,0,7.7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Edward Scott (Elisabeth Walton McMillan) Robert,female,43,0,1,211.3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Banoura Ayoub,female,13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Albert Adrian (Vera Gillespie) Dick,female,17,1,0,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Milton Clyde Long,male,29,0,0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drew G Johnston,male,35,1,2,23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Ali,male,25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braham (David Lishin) Harmer,male,25,0,0,7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nna Sofia Sjoblom,female,18,0,0,7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George Hugh Rice,male,8,4,1,29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Bertram Vere Dean,male,1,1,2,20.5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Benjamin Guggenheim,male,46,0,0,79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drew Keane,male,20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lfred Gaskell,male,16,0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Stella Anna Sage,female,21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illiam Fisher Hoyt,male,43,0,0,30.6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istiu Dantcheff,male,25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ichard Otter,male,39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Dr. Alice (Farnham) Leader,female,49,0,0,25.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Mara Osman,female,31,0,0,8.6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Yousseff Ibrahim Shawah,male,30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Jean Baptiste (Rosalie Paula Govaert) Van Impe,female,30,1,1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Martin Ponesell,male,3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Harvey (Charlotte Annie Tate) Collyer,female,31,1,1,26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aster. William Thornton II Carter,male,11,1,2,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Assad Alexander Thomas,male,0.42,0,1,8.5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Oskar Arvid Hedman,male,27,0,0,6.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arl Johan Johansson,male,31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Thomas Jr Andrews,male,39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Ellen Natalia Pettersson,female,18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ugust Meyer,male,39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Norman Campbell (Bertha Griggs) Chambers,female,33,1,0,5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William Alexander,male,26,0,0,7.8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mes Lester,male,39,0,0,24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Richard James Slemen,male,35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Ebba Iris Alfrida Andersson,female,6,4,2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Ernest Portage Tomlin,male,30.5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Richard Fry,male,39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Wendla Maria Heininen,female,23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Albert Mallet,male,31,1,1,37.0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Fredrik Alexander Holm,male,43,0,0,6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Karl Thorsten Skoog,male,10,3,2,2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Charles Melville (Clara Jennings Gregg) Hays,female,52,1,1,9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Nikola Lulic,male,27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Jonkheer. John George Reuchlin,male,38,0,0,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(Beila) Moor,female,27,0,1,12.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Urho Abraham Panula,male,2,4,1,39.68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n Flynn,male,36,0,0,6.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Len Lam,male,23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Andre Mallet,male,1,0,2,37.0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Thomas Joseph McCormack,male,19,0,0,7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George Nelson (Martha Evelyn) Stone,female,62,0,0,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Antoni (Selini Alexander) Yasbeck,female,15,1,0,14.4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aster. George Sibley Richards,male,0.83,1,1,18.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min Saad,male,30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bert Augustsson,male,23,0,0,7.8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Owen George Allum,male,18,0,0,8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Sara Rebecca Compton,female,39,1,1,83.1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akob Pasic,male,21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urice Sirota,male,20,0,0,8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. Chang Chip,male,32,0,0,56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Pierre Marechal,male,29,0,0,29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Ilmari Rudolf Alhomaki,male,20,0,0,7.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Thomas Charles Mudd,male,16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Augusta Serepeca,female,30,0,0,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eter L Lemberopolous,male,34.5,0,0,6.4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eso Culumovic,male,17,0,0,8.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nthony Abbing,male,42,0,0,7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Douglas Bullen Sage,male,18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Marin Markoff,male,35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John Harper,male,28,0,1,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Samuel L (Edwiga Grabowska) Goldenberg,female,40,1,0,89.1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aster. Sigvard Harald Elias Andersson,male,4,4,2,31.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 Svensson,male,74,0,0,7.7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Nourelain Boulos,female,9,1,1,15.2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y Conover Lines,female,16,0,1,39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s. Ernest Courtenay (Lilian Hughes) Carter,female,44,1,0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Sam (Leah Rosen) Aks,female,18,0,1,9.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George Dennick (Mary Hitchcock) Wick,female,45,1,1,164.8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Peter Denis Daly,male,51,0,0,26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rs. Solomon (Latifa Qurban) Baclini,female,24,0,3,19.2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Raihed Razi,male,30,0,0,7.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laus Peter Hansen,male,41,2,0,14.10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Frederick Edward Giles,male,21,1,0,1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Frederick Joel (Margaret Welles Barron) Swift,female,48,0,0,25.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Dorothy Edith Sage,female,14,8,2,69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John William Gill,male,24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(Karolina) Bystrom,female,42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iss. Asuncion Duran y More,female,27,1,0,13.8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Washington Augustus II Roebling,male,31,0,0,50.4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hilemon van Melkebeke,male,23,0,0,9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aster. Harold Theodor Johnson,male,4,1,1,11.1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Cerin Balkic,male,26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Richard Leonard (Sallie Monypeny) Beckwith,female,47,1,1,52.5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1,Mr. Frans Olof Carlsson,male,33,0,0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Victor Vander Cruyssen,male,47,0,0,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Samuel (Hannah Wizosky) Abelson,female,28,1,0,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3,Miss. Adele Kiamie Najib,female,15,0,0,7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Alfred Ossian Gustafsson,male,20,0,0,9.8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Nedelio Petroff,male,19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Kristo Laleff,male,2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s. Thomas Jr (Lily Alexenia Wilson) Potter,female,56,0,1,83.1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2,Mrs. William (Imanita Parrish Hall) Shelley,female,25,0,1,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Johann Markun,male,33,0,0,7.8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Gerda Ulrika Dahlberg,female,22,0,0,10.5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Mr. Frederick James Banfield,male,28,0,0,10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Henry Jr Sutehall,male,25,0,0,7.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s. William (Margaret Norton) Rice,female,39,0,5,29.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2,Rev. Juozas Montvila,male,27,0,0,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iss. Margaret Edith Graham,female,19,0,0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iss. Catherine Helen Johnston,female,7,1,2,23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,1,Mr. Karl Howell Behr,male,26,0,0,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,3,Mr. Patrick Dooley,male,32,0,0,7.75</text:p>
          </table:table-cell>
          <table:table-cell table:number-columns-repeated="16383"/>
        </table:table-row>
        <table:table-row table:number-rows-repeated="10476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25</meta:generator>
    <meta:initial-creator>Unknown</meta:initial-creator>
    <dc:creator>X</dc:creator>
    <meta:creation-date>2026-05-29T05:06:50Z</meta:creation-date>
    <dc:date>2026-05-29T14:29:24Z</dc:date>
  </office:meta>
</office:document-meta>
</file>